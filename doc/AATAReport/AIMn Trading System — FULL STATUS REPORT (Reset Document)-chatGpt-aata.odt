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size="6pt" style:font-size-asian="5.25pt" style:font-size-complex="6pt"/>
    </style:style>
    <style:style style:name="P2" style:family="paragraph" style:parent-style-name="Heading_20_2">
      <style:text-properties fo:font-size="6pt" style:font-size-asian="5.25pt" style:font-size-complex="6pt"/>
    </style:style>
    <style:style style:name="P3" style:family="paragraph" style:parent-style-name="Text_20_body">
      <style:text-properties fo:font-size="6pt" style:font-size-asian="5.25pt" style:font-size-complex="6pt"/>
    </style:style>
    <style:style style:name="P4" style:family="paragraph" style:parent-style-name="Quotations">
      <style:text-properties fo:font-size="6pt" style:font-size-asian="5.25pt" style:font-size-complex="6pt"/>
    </style:style>
    <style:style style:name="P5" style:family="paragraph" style:parent-style-name="Text_20_body" style:list-style-name="L1">
      <style:paragraph-properties fo:margin-top="0in" fo:margin-bottom="0in" style:contextual-spacing="false"/>
      <style:text-properties fo:font-size="6pt" style:font-size-asian="5.25pt" style:font-size-complex="6pt"/>
    </style:style>
    <style:style style:name="P6" style:family="paragraph" style:parent-style-name="Text_20_body" style:list-style-name="L1">
      <style:text-properties fo:font-size="6pt" style:font-size-asian="5.25pt" style:font-size-complex="6pt"/>
    </style:style>
    <style:style style:name="P7" style:family="paragraph" style:parent-style-name="Horizontal_20_Line">
      <style:text-properties style:font-size-asian="5.25pt"/>
    </style:style>
    <style:style style:name="P8" style:family="paragraph" style:parent-style-name="Heading_20_3">
      <style:text-properties fo:font-size="6pt" style:font-size-asian="5.25pt" style:font-size-complex="6pt"/>
    </style:style>
    <style:style style:name="P9" style:family="paragraph" style:parent-style-name="Text_20_body" style:list-style-name="L2">
      <style:paragraph-properties fo:margin-top="0in" fo:margin-bottom="0in" style:contextual-spacing="false"/>
      <style:text-properties fo:font-size="6pt" style:font-size-asian="5.25pt" style:font-size-complex="6pt"/>
    </style:style>
    <style:style style:name="P10" style:family="paragraph" style:parent-style-name="Text_20_body" style:list-style-name="L2">
      <style:text-properties fo:font-size="6pt" style:font-size-asian="5.25pt" style:font-size-complex="6pt"/>
    </style:style>
    <style:style style:name="P11" style:family="paragraph" style:parent-style-name="Text_20_body" style:list-style-name="L3">
      <style:paragraph-properties fo:margin-top="0in" fo:margin-bottom="0in" style:contextual-spacing="false"/>
      <style:text-properties fo:font-size="6pt" style:font-size-asian="5.25pt" style:font-size-complex="6pt"/>
    </style:style>
    <style:style style:name="P12" style:family="paragraph" style:parent-style-name="Text_20_body" style:list-style-name="L3">
      <style:text-properties fo:font-size="6pt" style:font-size-asian="5.25pt" style:font-size-complex="6pt"/>
    </style:style>
    <style:style style:name="P13" style:family="paragraph" style:parent-style-name="Text_20_body" style:list-style-name="L4">
      <style:paragraph-properties fo:margin-top="0in" fo:margin-bottom="0in" style:contextual-spacing="false"/>
      <style:text-properties fo:font-size="6pt" style:font-size-asian="5.25pt" style:font-size-complex="6pt"/>
    </style:style>
    <style:style style:name="P14" style:family="paragraph" style:parent-style-name="Text_20_body" style:list-style-name="L4">
      <style:text-properties fo:font-size="6pt" style:font-size-asian="5.25pt" style:font-size-complex="6pt"/>
    </style:style>
    <style:style style:name="P15" style:family="paragraph" style:parent-style-name="Text_20_body" style:list-style-name="L5">
      <style:paragraph-properties fo:margin-top="0in" fo:margin-bottom="0in" style:contextual-spacing="false"/>
      <style:text-properties fo:font-size="6pt" style:font-size-asian="5.25pt" style:font-size-complex="6pt"/>
    </style:style>
    <style:style style:name="P16" style:family="paragraph" style:parent-style-name="Text_20_body" style:list-style-name="L5">
      <style:text-properties fo:font-size="6pt" style:font-size-asian="5.25pt" style:font-size-complex="6pt"/>
    </style:style>
    <style:style style:name="P17" style:family="paragraph" style:parent-style-name="Text_20_body" style:list-style-name="L6">
      <style:paragraph-properties fo:margin-top="0in" fo:margin-bottom="0in" style:contextual-spacing="false"/>
      <style:text-properties fo:font-size="6pt" style:font-size-asian="5.25pt" style:font-size-complex="6pt"/>
    </style:style>
    <style:style style:name="P18" style:family="paragraph" style:parent-style-name="Text_20_body" style:list-style-name="L6">
      <style:text-properties fo:font-size="6pt" style:font-size-asian="5.25pt" style:font-size-complex="6pt"/>
    </style:style>
    <style:style style:name="P19" style:family="paragraph" style:parent-style-name="Heading_20_4">
      <style:text-properties fo:font-size="6pt" style:font-size-asian="5.25pt" style:font-size-complex="6pt"/>
    </style:style>
    <style:style style:name="P20" style:family="paragraph" style:parent-style-name="Text_20_body" style:list-style-name="L7">
      <style:paragraph-properties fo:margin-top="0in" fo:margin-bottom="0in" style:contextual-spacing="false"/>
      <style:text-properties fo:font-size="6pt" style:font-size-asian="5.25pt" style:font-size-complex="6pt"/>
    </style:style>
    <style:style style:name="P21" style:family="paragraph" style:parent-style-name="Text_20_body" style:list-style-name="L7">
      <style:text-properties fo:font-size="6pt" style:font-size-asian="5.25pt" style:font-size-complex="6pt"/>
    </style:style>
    <style:style style:name="P22" style:family="paragraph" style:parent-style-name="Text_20_body" style:list-style-name="L8">
      <style:paragraph-properties fo:margin-top="0in" fo:margin-bottom="0in" style:contextual-spacing="false"/>
      <style:text-properties fo:font-size="6pt" style:font-size-asian="5.25pt" style:font-size-complex="6pt"/>
    </style:style>
    <style:style style:name="P23" style:family="paragraph" style:parent-style-name="Text_20_body" style:list-style-name="L8">
      <style:text-properties fo:font-size="6pt" style:font-size-asian="5.25pt" style:font-size-complex="6pt"/>
    </style:style>
    <style:style style:name="P24" style:family="paragraph" style:parent-style-name="Text_20_body" style:list-style-name="L9">
      <style:paragraph-properties fo:margin-top="0in" fo:margin-bottom="0in" style:contextual-spacing="false"/>
      <style:text-properties fo:font-size="6pt" style:font-size-asian="5.25pt" style:font-size-complex="6pt"/>
    </style:style>
    <style:style style:name="P25" style:family="paragraph" style:parent-style-name="Text_20_body" style:list-style-name="L9">
      <style:text-properties fo:font-size="6pt" style:font-size-asian="5.25pt" style:font-size-complex="6pt"/>
    </style:style>
    <style:style style:name="P26" style:family="paragraph" style:parent-style-name="Text_20_body" style:list-style-name="L10">
      <style:paragraph-properties fo:margin-top="0in" fo:margin-bottom="0in" style:contextual-spacing="false"/>
      <style:text-properties fo:font-size="6pt" style:font-size-asian="5.25pt" style:font-size-complex="6pt"/>
    </style:style>
    <style:style style:name="P27" style:family="paragraph" style:parent-style-name="Text_20_body" style:list-style-name="L10">
      <style:text-properties fo:font-size="6pt" style:font-size-asian="5.25pt" style:font-size-complex="6pt"/>
    </style:style>
    <style:style style:name="P28" style:family="paragraph" style:parent-style-name="Text_20_body" style:list-style-name="L11">
      <style:paragraph-properties fo:margin-top="0in" fo:margin-bottom="0in" style:contextual-spacing="false"/>
      <style:text-properties fo:font-size="6pt" style:font-size-asian="5.25pt" style:font-size-complex="6pt"/>
    </style:style>
    <style:style style:name="P29" style:family="paragraph" style:parent-style-name="Text_20_body" style:list-style-name="L11">
      <style:text-properties fo:font-size="6pt" style:font-size-asian="5.25pt" style:font-size-complex="6pt"/>
    </style:style>
    <style:style style:name="P30" style:family="paragraph" style:parent-style-name="Text_20_body" style:list-style-name="L12">
      <style:paragraph-properties fo:margin-top="0in" fo:margin-bottom="0in" style:contextual-spacing="false"/>
      <style:text-properties fo:font-size="6pt" style:font-size-asian="5.25pt" style:font-size-complex="6pt"/>
    </style:style>
    <style:style style:name="P31" style:family="paragraph" style:parent-style-name="Text_20_body" style:list-style-name="L12">
      <style:text-properties fo:font-size="6pt" style:font-size-asian="5.25pt" style:font-size-complex="6pt"/>
    </style:style>
    <style:style style:name="P32" style:family="paragraph" style:parent-style-name="Text_20_body" style:list-style-name="L13">
      <style:paragraph-properties fo:margin-top="0in" fo:margin-bottom="0in" style:contextual-spacing="false"/>
      <style:text-properties fo:font-size="6pt" style:font-size-asian="5.25pt" style:font-size-complex="6pt"/>
    </style:style>
    <style:style style:name="P33" style:family="paragraph" style:parent-style-name="Text_20_body" style:list-style-name="L13">
      <style:text-properties fo:font-size="6pt" style:font-size-asian="5.25pt" style:font-size-complex="6pt"/>
    </style:style>
    <style:style style:name="P34" style:family="paragraph" style:parent-style-name="Preformatted_20_Text">
      <style:paragraph-properties fo:margin-left="0in" fo:margin-right="0in" fo:text-indent="0in" style:auto-text-indent="false"/>
      <style:text-properties fo:font-size="6pt" style:font-size-asian="5.25pt" style:font-size-complex="6pt"/>
    </style:style>
    <style:style style:name="P35" style:family="paragraph" style:parent-style-name="Preformatted_20_Text">
      <style:text-properties fo:font-size="6pt" style:font-size-asian="5.25pt" style:font-size-complex="6pt"/>
    </style:style>
    <style:style style:name="P36" style:family="paragraph" style:parent-style-name="Preformatted_20_Text">
      <style:paragraph-properties fo:margin-top="0in" fo:margin-bottom="0.1965in" style:contextual-spacing="false"/>
      <style:text-properties fo:font-size="6pt" style:font-size-asian="5.25pt" style:font-size-complex="6pt"/>
    </style:style>
    <style:style style:name="P37" style:family="paragraph" style:parent-style-name="Text_20_body" style:list-style-name="L14">
      <style:paragraph-properties fo:margin-top="0in" fo:margin-bottom="0in" style:contextual-spacing="false"/>
      <style:text-properties fo:font-size="6pt" style:font-size-asian="5.25pt" style:font-size-complex="6pt"/>
    </style:style>
    <style:style style:name="P38" style:family="paragraph" style:parent-style-name="Text_20_body" style:list-style-name="L14">
      <style:text-properties fo:font-size="6pt" style:font-size-asian="5.25pt" style:font-size-complex="6pt"/>
    </style:style>
    <style:style style:name="P39" style:family="paragraph" style:parent-style-name="Text_20_body" style:list-style-name="L15">
      <style:paragraph-properties fo:margin-top="0in" fo:margin-bottom="0in" style:contextual-spacing="false"/>
      <style:text-properties fo:font-size="6pt" style:font-size-asian="5.25pt" style:font-size-complex="6pt"/>
    </style:style>
    <style:style style:name="P40" style:family="paragraph" style:parent-style-name="Text_20_body" style:list-style-name="L15">
      <style:text-properties fo:font-size="6pt" style:font-size-asian="5.25pt" style:font-size-complex="6pt"/>
    </style:style>
    <style:style style:name="P41" style:family="paragraph" style:parent-style-name="Standard">
      <style:text-properties fo:font-size="6pt" style:font-size-asian="5.25pt" style:font-size-complex="6pt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📊 AIMn Trading System — FULL STATUS REPORT (Reset Document)</text:h>
      <text:h text:style-name="P2" text:outline-level="2">🧠 1. What we are building</text:h>
      <text:p text:style-name="P3">You are building:</text:p>
      <text:p text:style-name="P4">A real-time AI-assisted trading scanner + execution system<text:line-break/>with:</text:p>
      <text:list text:style-name="L1">
        <text:list-item>
          <text:p text:style-name="P5">live chart (candles) </text:p>
        </text:list-item>
        <text:list-item>
          <text:p text:style-name="P5">trade signal engine (BUY / SELL / EXIT) </text:p>
        </text:list-item>
        <text:list-item>
          <text:p text:style-name="P5">trailing stop logic (multi-stage) </text:p>
        </text:list-item>
        <text:list-item>
          <text:p text:style-name="P5">order execution (quick_safe) </text:p>
        </text:list-item>
        <text:list-item>
          <text:p text:style-name="P5">panic exit button </text:p>
        </text:list-item>
        <text:list-item>
          <text:p text:style-name="P6">multi-asset scanner dashboard </text:p>
        </text:list-item>
      </text:list>
      <text:p text:style-name="P7"/>
      <text:h text:style-name="P2" text:outline-level="2">⚙️ 2. Current architecture (what exists now)</text:h>
      <text:h text:style-name="P8" text:outline-level="3">🟢 Frontend (working but unstable during edits)</text:h>
      <text:list text:style-name="L2">
        <text:list-item>
          <text:p text:style-name="P9"><text:span text:style-name="Source_20_Text">/chart_lite_rt</text:span> </text:p>
        </text:list-item>
        <text:list-item>
          <text:p text:style-name="P9">Canvas-based candle chart </text:p>
        </text:list-item>
        <text:list-item>
          <text:p text:style-name="P9">Polling price feed (<text:span text:style-name="Source_20_Text">/price</text:span> or <text:span text:style-name="Source_20_Text">/price_lite</text:span>) </text:p>
        </text:list-item>
        <text:list-item>
          <text:p text:style-name="P9">Buttons: </text:p>
          <text:list>
            <text:list-item>
              <text:p text:style-name="P9">Create Order </text:p>
            </text:list-item>
            <text:list-item>
              <text:p text:style-name="P10">PANIC exit </text:p>
            </text:list-item>
          </text:list>
        </text:list-item>
      </text:list>
      <text:h text:style-name="P8" text:outline-level="3">🟡 Scanner dashboard</text:h>
      <text:list text:style-name="L3">
        <text:list-item>
          <text:p text:style-name="P11">Shows: </text:p>
          <text:list>
            <text:list-item>
              <text:p text:style-name="P11">BTC/ETH/SOL/LINK signals </text:p>
            </text:list-item>
            <text:list-item>
              <text:p text:style-name="P11">“NOT CONFIRMED” states </text:p>
            </text:list-item>
          </text:list>
        </text:list-item>
        <text:list-item>
          <text:p text:style-name="P12">Mostly informational layer </text:p>
        </text:list-item>
      </text:list>
      <text:h text:style-name="P8" text:outline-level="3">🟢 Backend (partially working)</text:h>
      <text:list text:style-name="L4">
        <text:list-item>
          <text:p text:style-name="P13"><text:span text:style-name="Source_20_Text">/api/trade_sessions/quick_safe</text:span> ✔ working </text:p>
        </text:list-item>
        <text:list-item>
          <text:p text:style-name="P13"><text:span text:style-name="Source_20_Text">/api/trade_sessions/&lt;id&gt;/close</text:span> ✔ expected </text:p>
        </text:list-item>
        <text:list-item>
          <text:p text:style-name="P13"><text:span text:style-name="Source_20_Text">/api/trade_sessions/&lt;id&gt;/snapshot</text:span> ✔ expected </text:p>
        </text:list-item>
        <text:list-item>
          <text:p text:style-name="P14"><text:span text:style-name="Source_20_Text">/price</text:span> or <text:span text:style-name="Source_20_Text">/price_lite</text:span> ✔ partially stable </text:p>
        </text:list-item>
      </text:list>
      <text:p text:style-name="P7"/>
      <text:h text:style-name="P2" text:outline-level="2">⚠️ 3. Core problems found</text:h>
      <text:h text:style-name="P8" text:outline-level="3">❌ Problem 1 — unstable UI templates</text:h>
      <text:list text:style-name="L5">
        <text:list-item>
          <text:p text:style-name="P15">Jinja <text:span text:style-name="Source_20_Text">tojson</text:span> crashes (<text:span text:style-name="Source_20_Text">Undefined is not JSON serializable</text:span>) </text:p>
        </text:list-item>
        <text:list-item>
          <text:p text:style-name="P15">frontend breaks chart rendering </text:p>
        </text:list-item>
        <text:list-item>
          <text:p text:style-name="P16">small changes caused full page failure </text:p>
        </text:list-item>
      </text:list>
      <text:p text:style-name="P7"/>
      <text:h text:style-name="P8" text:outline-level="3">❌ Problem 2 — inconsistent price feed</text:h>
      <text:list text:style-name="L6">
        <text:list-item>
          <text:p text:style-name="P17">chart sometimes freezes </text:p>
        </text:list-item>
        <text:list-item>
          <text:p text:style-name="P17">looks like “no movement for minutes” </text:p>
        </text:list-item>
        <text:list-item>
          <text:p text:style-name="P18">actually polling delay / caching / fallback feed issue </text:p>
        </text:list-item>
      </text:list>
      <text:p text:style-name="P7"/>
      <text:h text:style-name="P8" text:outline-level="3">❌ Problem 3 — entry logic mismatch (your key concern)</text:h>
      <text:p text:style-name="P3">You observed:</text:p>
      <text:p text:style-name="P4">“We enter LONG at the TOP, and reverse after move already happened”</text:p>
      <text:p text:style-name="P3">This is VERY likely caused by:</text:p>
      <text:h text:style-name="P19" text:outline-level="4">A) delayed signal calculation</text:h>
      <text:list text:style-name="L7">
        <text:list-item>
          <text:p text:style-name="P20">signal computed on lagging candle </text:p>
        </text:list-item>
        <text:list-item>
          <text:p text:style-name="P21">entry happens after breakout already started </text:p>
        </text:list-item>
      </text:list>
      <text:h text:style-name="P19" text:outline-level="4"><text:soft-page-break/>B) trend-follow logic without regime filter</text:h>
      <text:list text:style-name="L8">
        <text:list-item>
          <text:p text:style-name="P22">system enters breakout too late </text:p>
        </text:list-item>
        <text:list-item>
          <text:p text:style-name="P23">then reverses into short after exhaustion </text:p>
        </text:list-item>
      </text:list>
      <text:p text:style-name="P7"/>
      <text:h text:style-name="P8" text:outline-level="3">❌ Problem 4 — trailing system still evolving</text:h>
      <text:p text:style-name="P3">You described correctly:</text:p>
      <text:list text:style-name="L9">
        <text:list-item>
          <text:p text:style-name="P24">trailing start activates after profit threshold </text:p>
        </text:list-item>
        <text:list-item>
          <text:p text:style-name="P24">stage 2 tightening exists </text:p>
        </text:list-item>
        <text:list-item>
          <text:p text:style-name="P24">but: </text:p>
          <text:list>
            <text:list-item>
              <text:p text:style-name="P24">exit trigger timing still unclear </text:p>
            </text:list-item>
            <text:list-item>
              <text:p text:style-name="P24">“trailing minus” effect not visually clear </text:p>
            </text:list-item>
            <text:list-item>
              <text:p text:style-name="P25">users cannot <text:span text:style-name="Emphasis">see decision logic clearly</text:span> </text:p>
            </text:list-item>
          </text:list>
        </text:list-item>
      </text:list>
      <text:p text:style-name="P7"/>
      <text:h text:style-name="P2" text:outline-level="2">📉 4. What your screenshots are actually showing</text:h>
      <text:p text:style-name="P3">From BTC charts:</text:p>
      <text:h text:style-name="P8" text:outline-level="3">Market behavior:</text:h>
      <text:list text:style-name="L10">
        <text:list-item>
          <text:p text:style-name="P26">strong uptrend impulse </text:p>
        </text:list-item>
        <text:list-item>
          <text:p text:style-name="P27">pullback → continuation → breakout spike </text:p>
        </text:list-item>
      </text:list>
      <text:h text:style-name="P8" text:outline-level="3">Your system behavior:</text:h>
      <text:list text:style-name="L11">
        <text:list-item>
          <text:p text:style-name="P28">enters late into momentum </text:p>
        </text:list-item>
        <text:list-item>
          <text:p text:style-name="P28">often at or near local peak </text:p>
        </text:list-item>
        <text:list-item>
          <text:p text:style-name="P29">then reverses or exits poorly </text:p>
        </text:list-item>
      </text:list>
      <text:p text:style-name="P3">👉 This is NOT random<text:line-break/>👉 This is classic <text:span text:style-name="Strong_20_Emphasis">lagging signal system in trending market</text:span></text:p>
      <text:p text:style-name="P7"/>
      <text:h text:style-name="P2" text:outline-level="2">🧠 5. Key insight (important)</text:h>
      <text:p text:style-name="P3">Your intuition is correct:</text:p>
      <text:p text:style-name="P4">“We buy at the top and should have shorted instead”</text:p>
      <text:p text:style-name="P3">But the real issue is deeper:</text:p>
      <text:h text:style-name="P8" text:outline-level="3">The system has no regime detection:</text:h>
      <text:p text:style-name="P3">It does NOT clearly distinguish:</text:p>
      <text:list text:style-name="L12">
        <text:list-item>
          <text:p text:style-name="P30">trend continuation phase </text:p>
        </text:list-item>
        <text:list-item>
          <text:p text:style-name="P30">exhaustion phase </text:p>
        </text:list-item>
        <text:list-item>
          <text:p text:style-name="P30">breakout entry phase </text:p>
        </text:list-item>
        <text:list-item>
          <text:p text:style-name="P31">mean reversion zone </text:p>
        </text:list-item>
      </text:list>
      <text:p text:style-name="P3">So it:</text:p>
      <text:p text:style-name="P4">reacts to price instead of classifying market state</text:p>
      <text:p text:style-name="P7"/>
      <text:h text:style-name="P2" text:outline-level="2">🔧 6. What is actually working well</text:h>
      <text:p text:style-name="P3">✔ Live chart rendering (mostly stable now)<text:line-break/>✔ Order creation (<text:span text:style-name="Source_20_Text">quick_safe</text:span>)<text:line-break/>✔ PANIC exit concept<text:line-break/>✔ Multi-asset scanner exists<text:line-break/>✔ Trailing framework exists (multi-stage idea is good)</text:p>
      <text:p text:style-name="P7"/>
      <text:h text:style-name="P2" text:outline-level="2">⚠️ 7. What is NOT solved yet</text:h>
      <text:p text:style-name="P3">❌ Entry timing logic (biggest issue)<text:line-break/>❌ Market regime classification<text:line-break/><text:soft-page-break/>❌ Signal delay compensation<text:line-break/>❌ Clear visualization of “why entry happened”<text:line-break/>❌ Fully stable feed abstraction layer</text:p>
      <text:p text:style-name="P7"/>
      <text:h text:style-name="P2" text:outline-level="2">🎯 8. What we should do next (IMPORTANT)</text:h>
      <text:p text:style-name="P3">Do NOT add features now.</text:p>
      <text:p text:style-name="P3">We need to stabilize understanding:</text:p>
      <text:h text:style-name="P8" text:outline-level="3">STEP 1 — Label every trade you show me</text:h>
      <text:p text:style-name="P3">We classify:</text:p>
      <text:list text:style-name="L13">
        <text:list-item>
          <text:p text:style-name="P32">late entry </text:p>
        </text:list-item>
        <text:list-item>
          <text:p text:style-name="P32">trend chase </text:p>
        </text:list-item>
        <text:list-item>
          <text:p text:style-name="P32">valid breakout </text:p>
        </text:list-item>
        <text:list-item>
          <text:p text:style-name="P32">false signal </text:p>
        </text:list-item>
        <text:list-item>
          <text:p text:style-name="P33">execution delay artifact </text:p>
        </text:list-item>
      </text:list>
      <text:p text:style-name="P7"/>
      <text:h text:style-name="P8" text:outline-level="3">STEP 2 — build “reason logging”</text:h>
      <text:p text:style-name="P3">Every entry must show:</text:p>
      <text:p text:style-name="P3">Example:</text:p>
      <text:section text:style-name="Sect1" text:name="code-block-viewer">
        <text:p text:style-name="P34"><text:span text:style-name="Source_20_Text">ENTRY: LONG</text:span></text:p>
        <text:p text:style-name="P35"><text:span text:style-name="Source_20_Text">REASON:</text:span></text:p>
        <text:p text:style-name="P35"><text:span text:style-name="Source_20_Text">- RSI breakout</text:span></text:p>
        <text:p text:style-name="P35"><text:span text:style-name="Source_20_Text">- trend strength high</text:span></text:p>
        <text:p text:style-name="P36"><text:span text:style-name="Source_20_Text">- volume spike detected</text:span></text:p>
      </text:section>
      <text:p text:style-name="P3">Right now you only see:</text:p>
      <text:p text:style-name="P4">BUY / SELL</text:p>
      <text:p text:style-name="P3">That is not enough.</text:p>
      <text:p text:style-name="P7"/>
      <text:h text:style-name="P8" text:outline-level="3">STEP 3 — add regime filter later</text:h>
      <text:p text:style-name="P3">We will add:</text:p>
      <text:list text:style-name="L14">
        <text:list-item>
          <text:p text:style-name="P37">trend vs range detection </text:p>
        </text:list-item>
        <text:list-item>
          <text:p text:style-name="P37">volatility filter </text:p>
        </text:list-item>
        <text:list-item>
          <text:p text:style-name="P38">breakout confirmation delay control </text:p>
        </text:list-item>
      </text:list>
      <text:p text:style-name="P7"/>
      <text:h text:style-name="P2" text:outline-level="2">🧭 9. Answer to your question directly</text:h>
      <text:p text:style-name="P4">“can we continue or should I start new chat?”</text:p>
      <text:p text:style-name="P3">You can absolutely continue here.</text:p>
      <text:p text:style-name="P3">But I recommend:</text:p>
      <text:list text:style-name="L15">
        <text:list-item>
          <text:p text:style-name="P39">we treat THIS message as the <text:span text:style-name="Strong_20_Emphasis">system reset point</text:span> </text:p>
        </text:list-item>
        <text:list-item>
          <text:p text:style-name="P40">everything from now on builds on this structure </text:p>
        </text:list-item>
      </text:list>
      <text:p text:style-name="P7"/>
      <text:h text:style-name="P2" text:outline-level="2">🧩 Final summary</text:h>
      <text:p text:style-name="P3">What you built is already strong:</text:p>
      <text:p text:style-name="P3">But right now the issue is:</text:p>
      <text:p text:style-name="P4">not “bad AI strategy”<text:line-break/>but “AI reacting too late + no market state awareness”</text:p>
      <text:p text:style-name="P4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05T17:36:07.885172500</meta:creation-date>
    <dc:date>2026-07-05T17:37:56.165670800</dc:date>
    <meta:editing-duration>PT1M48S</meta:editing-duration>
    <meta:editing-cycles>1</meta:editing-cycles>
    <meta:document-statistic meta:table-count="0" meta:image-count="0" meta:object-count="0" meta:page-count="3" meta:paragraph-count="117" meta:word-count="662" meta:character-count="3889" meta:non-whitespace-character-count="3336"/>
    <meta:generator>LibreOffice/25.8.7.1$Windows_X86_64 LibreOffice_project/39c3b7ac021cfb9f4ca681457ad36828f90e2ce7</meta:generator>
  </office:meta>
</office:document-meta>
</file>