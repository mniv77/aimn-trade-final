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TA Session Summary – Continue From Here</text:h>
      <text:h text:style-name="P2" text:outline-level="2">Current Status</text:h>
      <text:p text:style-name="P3">The AATA (AIMn Autonomous Trading Academy) database has been created and populated with its initial engineering knowledge.</text:p>
      <text:h text:style-name="P4" text:outline-level="3">Current Tables</text:h>
      <text:list text:style-name="L1">
        <text:list-item>
          <text:p text:style-name="P5">MANUAL</text:p>
        </text:list-item>
        <text:list-item>
          <text:p text:style-name="P5">PRINCIPLES</text:p>
        </text:list-item>
        <text:list-item>
          <text:p text:style-name="P5">LESSONS</text:p>
        </text:list-item>
        <text:list-item>
          <text:p text:style-name="P5">DISCOVERIES</text:p>
        </text:list-item>
        <text:list-item>
          <text:p text:style-name="P5">RESEARCH</text:p>
        </text:list-item>
        <text:list-item>
          <text:p text:style-name="P5">DECISIONS</text:p>
        </text:list-item>
        <text:list-item>
          <text:p text:style-name="P5">PATTERNS</text:p>
        </text:list-item>
        <text:list-item>
          <text:p text:style-name="P5">SYMBOL_PERSONALITY</text:p>
        </text:list-item>
        <text:list-item>
          <text:p text:style-name="P5">QUOTES</text:p>
        </text:list-item>
        <text:list-item>
          <text:p text:style-name="P5">PROJECT_HISTORY</text:p>
        </text:list-item>
        <text:list-item>
          <text:p text:style-name="P5">DAILY_LOG</text:p>
        </text:list-item>
        <text:list-item>
          <text:p text:style-name="P5">REPORT_DEFINITIONS</text:p>
        </text:list-item>
        <text:list-item>
          <text:p text:style-name="P6">REPORT_EXECUTIONS</text:p>
        </text:list-item>
      </text:list>
      <text:h text:style-name="P4" text:outline-level="3">Engineering Philosophy</text:h>
      <text:p text:style-name="P3">The Academy database is the <text:span text:style-name="Strong_20_Emphasis">single source of truth</text:span>.</text:p>
      <text:p text:style-name="P3">Workflow:</text:p>
      <text:p text:style-name="P3">Idea<text:line-break/>→ AATA Database<text:line-break/>→ GitHub<text:line-break/>→ Code<text:line-break/>→ Testing<text:line-break/>→ Production<text:line-break/>→ Lesson Learned<text:line-break/>→ Back into AATA</text:p>
      <text:h text:style-name="P4" text:outline-level="3">Major Principles</text:h>
      <text:list text:style-name="L2">
        <text:list-item>
          <text:p text:style-name="P7">Every chart tells a story.</text:p>
        </text:list-item>
        <text:list-item>
          <text:p text:style-name="P7">Every symbol has its own personality.</text:p>
        </text:list-item>
        <text:list-item>
          <text:p text:style-name="P7">A trend is not a trade.</text:p>
        </text:list-item>
        <text:list-item>
          <text:p text:style-name="P7">Indicators advise; they do not command.</text:p>
        </text:list-item>
        <text:list-item>
          <text:p text:style-name="P8">The Dean makes the final decision.</text:p>
        </text:list-item>
      </text:list>
      <text:h text:style-name="P4" text:outline-level="3">Architecture</text:h>
      <text:p text:style-name="P3">The trading engine is evolving into a collection of Professors:</text:p>
      <text:list text:style-name="L3">
        <text:list-item>
          <text:p text:style-name="P9">Professor Vision</text:p>
        </text:list-item>
        <text:list-item>
          <text:p text:style-name="P9">Professor Trend</text:p>
        </text:list-item>
        <text:list-item>
          <text:p text:style-name="P9">Professor Volume</text:p>
        </text:list-item>
        <text:list-item>
          <text:p text:style-name="P9">Professor Pattern</text:p>
        </text:list-item>
        <text:list-item>
          <text:p text:style-name="P9">Professor Momentum (RSI/MACD)</text:p>
        </text:list-item>
        <text:list-item>
          <text:p text:style-name="P9">Professor Symbol Personality</text:p>
        </text:list-item>
        <text:list-item>
          <text:p text:style-name="P10">Professor Risk</text:p>
        </text:list-item>
      </text:list>
      <text:p text:style-name="P3">The Dean evaluates all Professors and makes the final decision.</text:p>
      <text:h text:style-name="P4" text:outline-level="3">Major Research Topics</text:h>
      <text:list text:style-name="L4">
        <text:list-item>
          <text:p text:style-name="P11">False Veto Analysis</text:p>
        </text:list-item>
        <text:list-item>
          <text:p text:style-name="P11">Early Breakout Recognition</text:p>
        </text:list-item>
        <text:list-item>
          <text:p text:style-name="P12">Zero Data Loss Backup Strategy</text:p>
        </text:list-item>
      </text:list>
      <text:h text:style-name="P4" text:outline-level="3">Reporting</text:h>
      <text:p text:style-name="P3">REPORT_DEFINITIONS stores report SQL.</text:p>
      <text:p text:style-name="P3">REPORT_EXECUTIONS stores report history.</text:p>
      <text:p text:style-name="P3">The first report is:</text:p>
      <text:p text:style-name="P3">AATA Engineering Manual</text:p>
      <text:h text:style-name="P4" text:outline-level="3">Next Development Tasks</text:h>
      <text:list text:style-name="L5">
        <text:list-item>
          <text:p text:style-name="P13">Build the Python report engine.</text:p>
        </text:list-item>
        <text:list-item>
          <text:p text:style-name="P13">Build the Dean Decision Engine.</text:p>
        </text:list-item>
        <text:list-item>
          <text:p text:style-name="P13">Create historical candle charts with AI recommendations overlaid for trade review.</text:p>
        </text:list-item>
        <text:list-item>
          <text:p text:style-name="P13">Add Blocked Trade logging for future analysis.</text:p>
        </text:list-item>
        <text:list-item>
          <text:p text:style-name="P14"><text:soft-page-break/>Continue populating the Academy as new discoveries are made.</text:p>
        </text:list-item>
      </text:list>
      <text:p text:style-name="P3">The Academy is now the permanent engineering memory of the project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6T17:26:23.898258400</meta:creation-date>
    <dc:date>2026-06-26T17:31:32.524592300</dc:date>
    <meta:editing-duration>PT5M9S</meta:editing-duration>
    <meta:editing-cycles>1</meta:editing-cycles>
    <meta:document-statistic meta:table-count="0" meta:image-count="0" meta:object-count="0" meta:page-count="2" meta:paragraph-count="53" meta:word-count="253" meta:character-count="1561" meta:non-whitespace-character-count="1393"/>
    <meta:generator>LibreOffice/25.8.7.1$Windows_X86_64 LibreOffice_project/39c3b7ac021cfb9f4ca681457ad36828f90e2ce7</meta:generator>
  </office:meta>
</office:document-meta>
</file>