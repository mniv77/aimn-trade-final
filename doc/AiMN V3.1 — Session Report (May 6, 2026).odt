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6pt" style:font-size-asian="5.25pt" style:font-size-complex="6pt"/>
    </style:style>
    <style:style style:name="P2" style:family="paragraph" style:parent-style-name="Heading_20_3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6" style:family="paragraph" style:parent-style-name="Text_20_body" style:list-style-name="L1">
      <style:text-properties fo:font-size="6pt" style:font-size-asian="5.25pt" style:font-size-complex="6pt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8" style:family="paragraph" style:parent-style-name="Text_20_body" style:list-style-name="L2">
      <style:text-properties fo:font-size="6pt" style:font-size-asian="5.25pt" style:font-size-complex="6pt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0" style:family="paragraph" style:parent-style-name="Text_20_body" style:list-style-name="L3">
      <style:text-properties fo:font-size="6pt" style:font-size-asian="5.25pt" style:font-size-complex="6pt"/>
    </style:style>
    <style:style style:name="P11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2" style:family="paragraph" style:parent-style-name="Text_20_body" style:list-style-name="L4">
      <style:text-properties fo:font-size="6pt" style:font-size-asian="5.25pt" style:font-size-complex="6pt"/>
    </style:style>
    <style:style style:name="P13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4" style:family="paragraph" style:parent-style-name="Text_20_body" style:list-style-name="L5">
      <style:text-properties fo:font-size="6pt" style:font-size-asian="5.25pt" style:font-size-complex="6pt"/>
    </style:style>
    <style:style style:name="P15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6" style:family="paragraph" style:parent-style-name="Text_20_body" style:list-style-name="L6">
      <style:text-properties fo:font-size="6pt" style:font-size-asian="5.25pt" style:font-size-complex="6pt"/>
    </style:style>
    <style:style style:name="P17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8" style:family="paragraph" style:parent-style-name="Text_20_body" style:list-style-name="L7">
      <style:text-properties fo:font-size="6pt" style:font-size-asian="5.25pt" style:font-size-complex="6pt"/>
    </style:style>
    <style:style style:name="P19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0" style:family="paragraph" style:parent-style-name="Text_20_body" style:list-style-name="L8">
      <style:text-properties fo:font-size="6pt" style:font-size-asian="5.25pt" style:font-size-complex="6pt"/>
    </style:style>
    <style:style style:name="P21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2" style:family="paragraph" style:parent-style-name="Text_20_body" style:list-style-name="L9">
      <style:text-properties fo:font-size="6pt" style:font-size-asian="5.25pt" style:font-size-complex="6pt"/>
    </style:style>
    <style:style style:name="P23" style:family="paragraph" style:parent-style-name="Text_20_body">
      <style:paragraph-properties fo:margin-left="0in" fo:margin-right="0in" fo:text-indent="0in" style:auto-text-indent="false"/>
      <style:text-properties fo:font-size="6pt" style:font-size-asian="5.25pt" style:font-size-complex="6pt"/>
    </style:style>
    <style:style style:name="P24" style:family="paragraph" style:parent-style-name="Preformatted_20_Text">
      <loext:graphic-properties draw:fill="none" draw:fill-color="#ffffff"/>
      <style:paragraph-properties fo:margin-left="0in" fo:margin-right="0in" fo:text-indent="0in" style:auto-text-indent="false" fo:background-color="transparent"/>
      <style:text-properties fo:font-size="6pt" style:font-size-asian="5.25pt" style:font-size-complex="6pt"/>
    </style:style>
    <style:style style:name="P25" style:family="paragraph" style:parent-style-name="Preformatted_20_Text">
      <loext:graphic-properties draw:fill="none" draw:fill-color="#ffffff"/>
      <style:paragraph-properties fo:margin-left="0in" fo:margin-right="0in" fo:margin-top="0in" fo:margin-bottom="0.1965in" style:contextual-spacing="false" fo:text-indent="0in" style:auto-text-indent="false" fo:background-color="transparent"/>
      <style:text-properties fo:font-size="6pt" style:font-size-asian="5.25pt" style:font-size-complex="6pt"/>
    </style:style>
    <style:style style:name="P26" style:family="paragraph" style:parent-style-name="Standard">
      <style:text-properties fo:font-size="6pt" style:font-size-asian="5.25pt" style:font-size-complex="6pt"/>
    </style:style>
    <style:style style:name="T1" style:family="text">
      <style:text-properties fo:color="#0051c2" loext:opacity="100%" fo:font-family="'var font-mono'" fo:background-color="transparent" loext:char-shading-value="0"/>
    </style:style>
    <style:style style:name="T2" style:family="text">
      <style:text-properties fo:color="#14181f" loext:opacity="100%" fo:font-family="'var font-mono'" fo:background-color="transparent" loext:char-shading-value="0"/>
    </style:style>
    <style:style style:name="T3" style:family="text">
      <style:text-properties fo:color="#008080" loext:opacity="100%" fo:font-family="'var font-mono'" fo:background-color="transparent" loext:char-shading-value="0"/>
    </style:style>
    <style:style style:name="T4" style:family="text">
      <style:text-properties fo:color="#b34a00" loext:opacity="100%" fo:font-family="'var font-mono'" fo:background-color="transparent" loext:char-shading-value="0"/>
    </style:style>
    <style:style style:name="T5" style:family="text">
      <style:text-properties fo:color="#b80a18" loext:opacity="100%" fo:font-family="'var font-mono'" fo:font-weight="bold" fo:background-color="transparent" loext:char-shading-value="0"/>
    </style:style>
    <style:style style:name="T6" style:family="text">
      <style:text-properties fo:color="#008000" loext:opacity="100%" fo:font-family="'var font-mono'" fo:background-color="transparent" loext:char-shading-value="0"/>
    </style:style>
    <style:style style:name="T7" style:family="text">
      <style:text-properties fo:color="#8100c2" loext:opacity="100%" fo:font-family="'var font-mono'" fo:background-color="transparent" loext:char-shading-value="0"/>
    </style:style>
    <style:style style:name="T8" style:family="text">
      <style:text-properties fo:color="#2b303b" loext:opacity="100%" fo:font-family="'var font-mono'" fo:background-color="transparent" loext:char-shading-value="0"/>
    </style:style>
    <style:style style:name="T9" style:family="text">
      <style:text-properties fo:color="#14181f" loext:opacity="100%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iMN V3.1 — Session Report (May 6, 2026)</text:h>
      <text:h text:style-name="P2" text:outline-level="3">Current State</text:h>
      <text:p text:style-name="P3"><text:span text:style-name="Strong_20_Emphasis">Engine:</text:span> Running on PythonAnywhere, PID varies after restarts. Always-on task active. <text:span text:style-name="Strong_20_Emphasis">File location:</text:span> <text:span text:style-name="Source_20_Text">/home/MeirNiv/aimn-trade-final/</text:span> <text:span text:style-name="Strong_20_Emphasis">Main engine:</text:span> <text:span text:style-name="Source_20_Text">aimn_engine.py</text:span> — 3 threads (price, indicators, executor) <text:span text:style-name="Strong_20_Emphasis">Live trade now:</text:span> ETH/USD LONG, entry $2353.12, +0.27%, RSI=12.6, Gate=1.50%, Decay=2.0h</text:p>
      <text:p text:style-name="P4"/>
      <text:h text:style-name="P2" text:outline-level="3">Strategy Parameters (Active as of May 6)</text:h>
      <text:p text:style-name="P3"><text:span text:style-name="Strong_20_Emphasis">Active symbols and directions:</text:span></text:p>
      <text:list text:style-name="L1">
        <text:list-item>
          <text:p text:style-name="P5">BTC/USD — LONG (1hr, 30m, 5m) + SHORT (1hr, 30m) </text:p>
        </text:list-item>
        <text:list-item>
          <text:p text:style-name="P5">ETH/USD — LONG (1hr, 30m, 5m) + SHORT (1hr, 30m, 5m) </text:p>
        </text:list-item>
        <text:list-item>
          <text:p text:style-name="P5">LINK/USD — LONG (1hr, 30m, 5m) only — SHORT deactivated </text:p>
        </text:list-item>
        <text:list-item>
          <text:p text:style-name="P5">SOL/USD — LONG (1hr, 30m, 5m) only — ALL SHORT deactivated (uptrend) </text:p>
        </text:list-item>
        <text:list-item>
          <text:p text:style-name="P5">MSFT — LONG (1hr, 30m, 5m) only — SHORT deactivated </text:p>
        </text:list-item>
        <text:list-item>
          <text:p text:style-name="P5">NVDA — LONG (1hr, 30m, 5m) + SHORT (5m, 30m) </text:p>
        </text:list-item>
        <text:list-item>
          <text:p text:style-name="P5">QQQ — LONG (1hr, 30m, 5m) + SHORT (1hr, 5m) </text:p>
        </text:list-item>
        <text:list-item>
          <text:p text:style-name="P5">TSLA — LONG (5m, 15m) + SHORT (1hr, 30m, 5m) </text:p>
        </text:list-item>
        <text:list-item>
          <text:p text:style-name="P6">SPY — LONG (5m) only — SHORT deactivated </text:p>
        </text:list-item>
      </text:list>
      <text:p text:style-name="P4"/>
      <text:h text:style-name="P2" text:outline-level="3">Key Fixes Made This Session</text:h>
      <text:p text:style-name="P3"><text:span text:style-name="Strong_20_Emphasis">Entry logic (</text:span><text:span text:style-name="Strong_20_Emphasis"><text:span text:style-name="Source_20_Text">auto_executor.py</text:span></text:span><text:span text:style-name="Strong_20_Emphasis">):</text:span></text:p>
      <text:list text:style-name="L2">
        <text:list-item>
          <text:p text:style-name="P7">MACD rising/falling filter added (LONG needs MACD positive AND rising) </text:p>
        </text:list-item>
        <text:list-item>
          <text:p text:style-name="P7">Extreme RSI override: RSI ≤ 8 for LONG, RSI ≥ 92 for SHORT — bypasses MACD filter </text:p>
        </text:list-item>
        <text:list-item>
          <text:p text:style-name="P7">Stop loss minimum 300 seconds before firing </text:p>
        </text:list-item>
        <text:list-item>
          <text:p text:style-name="P7">Trail exit minimum 300 seconds before firing </text:p>
        </text:list-item>
        <text:list-item>
          <text:p text:style-name="P8">Sanity check raised to 20% </text:p>
        </text:list-item>
      </text:list>
      <text:p text:style-name="P3"><text:span text:style-name="Strong_20_Emphasis">Cooldown logic (</text:span><text:span text:style-name="Strong_20_Emphasis"><text:span text:style-name="Source_20_Text">auto_executor.py</text:span></text:span><text:span text:style-name="Strong_20_Emphasis">):</text:span></text:p>
      <text:list text:style-name="L3">
        <text:list-item>
          <text:p text:style-name="P9">STOP exit → both directions locked 2 hours </text:p>
        </text:list-item>
        <text:list-item>
          <text:p text:style-name="P9">TRAIL/RSI exit → opposite direction immediately free </text:p>
        </text:list-item>
        <text:list-item>
          <text:p text:style-name="P10">DECAY exit → same direction locked 30 min only </text:p>
        </text:list-item>
      </text:list>
      <text:p text:style-name="P3"><text:span text:style-name="Strong_20_Emphasis">Tuner (</text:span><text:span text:style-name="Strong_20_Emphasis"><text:span text:style-name="Source_20_Text">run_tuning_all.py</text:span></text:span><text:span text:style-name="Strong_20_Emphasis">):</text:span></text:p>
      <text:list text:style-name="L4">
        <text:list-item>
          <text:p text:style-name="P11">Train/test split changed to 50/50 (from 70/30) </text:p>
        </text:list-item>
        <text:list-item>
          <text:p text:style-name="P11">decay_start_options: [1.0, 2.0] (removed 0.5) </text:p>
        </text:list-item>
        <text:list-item>
          <text:p text:style-name="P11">init_profit_options: [0.5, 1.0, 1.5, 2.0] </text:p>
        </text:list-item>
        <text:list-item>
          <text:p text:style-name="P11">STOCK_TFS now includes 30m timeframe </text:p>
        </text:list-item>
        <text:list-item>
          <text:p text:style-name="P12">min_trades reduced to 3 </text:p>
        </text:list-item>
      </text:list>
      <text:p text:style-name="P3"><text:span text:style-name="Strong_20_Emphasis">Database fixes:</text:span></text:p>
      <text:list text:style-name="L5">
        <text:list-item>
          <text:p text:style-name="P13">18 strategies updated: decay_start 0.5 → 1.0 </text:p>
        </text:list-item>
        <text:list-item>
          <text:p text:style-name="P13">Deactivated all inactive broker strategies (47 rows) </text:p>
        </text:list-item>
        <text:list-item>
          <text:p text:style-name="P13">Deactivated SOL SHORT all timeframes </text:p>
        </text:list-item>
        <text:list-item>
          <text:p text:style-name="P13">Deactivated LINK SHORT 1hr </text:p>
        </text:list-item>
        <text:list-item>
          <text:p text:style-name="P13">Deactivated SPY SHORT </text:p>
        </text:list-item>
        <text:list-item>
          <text:p text:style-name="P13">MSFT LONG 30m stop_loss tightened to 0.30% </text:p>
        </text:list-item>
        <text:list-item>
          <text:p text:style-name="P14">NVDA LONG 5m stop_loss tightened to 0.50% </text:p>
        </text:list-item>
      </text:list>
      <text:p text:style-name="P3"><text:span text:style-name="Strong_20_Emphasis">Dashboard (</text:span><text:span text:style-name="Strong_20_Emphasis"><text:span text:style-name="Source_20_Text">aimn_flowing_scanner_auto.html</text:span></text:span><text:span text:style-name="Strong_20_Emphasis">):</text:span></text:p>
      <text:list text:style-name="L6">
        <text:list-item>
          <text:p text:style-name="P15">strategyMap key changed to <text:span text:style-name="Source_20_Text">symbol:direction:candle_time</text:span> </text:p>
        </text:list-item>
        <text:list-item>
          <text:p text:style-name="P15">Scanner now shows symbol + LONG/SHORT badge + candle_time per row </text:p>
        </text:list-item>
        <text:list-item>
          <text:p text:style-name="P15">Each row = one specific strategy (not one per symbol) </text:p>
        </text:list-item>
        <text:list-item>
          <text:p text:style-name="P15">Decay/init values now show correctly per trade </text:p>
        </text:list-item>
        <text:list-item>
          <text:p text:style-name="P16">Conveyor belt rotation fixed with strategyRowOffset </text:p>
        </text:list-item>
      </text:list>
      <text:p text:style-name="P4"/>
      <text:h text:style-name="P2" text:outline-level="3">Current Performance</text:h>
      <text:p text:style-name="P3"><text:span text:style-name="Strong_20_Emphasis">Overall:</text:span> -12.75% (paper trading) <text:span text:style-name="Strong_20_Emphasis">Main problem:</text:span> Too many STOP losses — 13 stops in 24 hours at -0.58% avg <text:span text:style-name="Strong_20_Emphasis">Root cause:</text:span> Shorting uptrending symbols (SOL, LINK) — now fixed by deactivating</text:p>
      <text:p text:style-name="P3"><text:span text:style-name="Strong_20_Emphasis">24hr breakdown (before fixes):</text:span></text:p>
      <text:list text:style-name="L7">
        <text:list-item>
          <text:p text:style-name="P17">DECAY-EXIT: +1.83% (good) </text:p>
        </text:list-item>
        <text:list-item>
          <text:p text:style-name="P17">TRAIL-EXIT: +1.19% (good) </text:p>
        </text:list-item>
        <text:list-item>
          <text:p text:style-name="P18">STOP: -7.48% (bad — now being fixed) </text:p>
        </text:list-item>
      </text:list>
      <text:p text:style-name="P3"><text:span text:style-name="Strong_20_Emphasis">Best exit type:</text:span> DECAY-EXIT averaging +0.34% per trade <text:span text:style-name="Strong_20_Emphasis">Worst symbols:</text:span> SOL SHORT (5 stops), MSFT LONG (2 stops)</text:p>
      <text:p text:style-name="P4"/>
      <text:h text:style-name="P2" text:outline-level="3"><text:soft-page-break/>Pending Issues</text:h>
      <text:list text:style-name="L8">
        <text:list-item>
          <text:p text:style-name="P19"><text:span text:style-name="Strong_20_Emphasis">Duplicate orders bug</text:span> — same trade recorded twice in orders table at identical timestamps. Not yet fixed. Likely race condition in executor running every 2 seconds. </text:p>
        </text:list-item>
        <text:list-item>
          <text:p text:style-name="P19"><text:span text:style-name="Strong_20_Emphasis">IBKR integration</text:span> — Meir registered for Interactive Brokers paper trading. Setup not started yet. Need to add IBKR as broker in AiMN. </text:p>
        </text:list-item>
        <text:list-item>
          <text:p text:style-name="P19"><text:span text:style-name="Strong_20_Emphasis">Backtest vs Live gap</text:span> — -12.75% suggests strategies are overfitting to historical data. The 50/50 train/test split should help going forward. </text:p>
        </text:list-item>
        <text:list-item>
          <text:p text:style-name="P20"><text:span text:style-name="Strong_20_Emphasis">Tuning quality</text:span> — Most crypto strategies have very low pl_pct (0.1-2%). The tuner finds parameters that barely work. Consider widening the grid search ranges. </text:p>
        </text:list-item>
      </text:list>
      <text:p text:style-name="P4"/>
      <text:h text:style-name="P2" text:outline-level="3">Immediate Next Steps</text:h>
      <text:list text:style-name="L9">
        <text:list-item>
          <text:p text:style-name="P21">Monitor ETH/USD LONG trade (currently open, +0.27%) </text:p>
        </text:list-item>
        <text:list-item>
          <text:p text:style-name="P21">Watch if STOP count decreases with today's fixes </text:p>
        </text:list-item>
        <text:list-item>
          <text:p text:style-name="P21">Set up IBKR paper trading API </text:p>
        </text:list-item>
        <text:list-item>
          <text:p text:style-name="P21">Fix duplicate orders bug </text:p>
        </text:list-item>
        <text:list-item>
          <text:p text:style-name="P22">Let tuner run daily at 7am and check if fresh strategies improve performance </text:p>
        </text:list-item>
      </text:list>
      <text:p text:style-name="P4"/>
      <text:h text:style-name="P2" text:outline-level="3">How to Restart Engine</text:h>
      <text:p text:style-name="P23">bash</text:p>
      <text:p text:style-name="P24"><text:span text:style-name="Source_20_Text"><text:span text:style-name="T1">pkill</text:span></text:span><text:span text:style-name="Source_20_Text"><text:span text:style-name="T2"> -f aimn_engine.py</text:span></text:span></text:p>
      <text:p text:style-name="P24"><text:span text:style-name="Source_20_Text"><text:span text:style-name="T1">sleep</text:span></text:span><text:span text:style-name="Source_20_Text"><text:span text:style-name="T2"> </text:span></text:span><text:span text:style-name="Source_20_Text"><text:span text:style-name="T3">2</text:span></text:span></text:p>
      <text:p text:style-name="P25"><text:span text:style-name="Source_20_Text"><text:span text:style-name="T4">cd</text:span></text:span><text:span text:style-name="Source_20_Text"><text:span text:style-name="T2"> ~/aimn-trade-final &amp;&amp; python aimn_engine.py &gt;&gt; engine.log </text:span></text:span><text:span text:style-name="Source_20_Text"><text:span text:style-name="T5">2</text:span></text:span><text:span text:style-name="Source_20_Text"><text:span text:style-name="T2">&gt;</text:span></text:span><text:span text:style-name="Source_20_Text"><text:span text:style-name="T5">&amp;1</text:span></text:span><text:span text:style-name="Source_20_Text"><text:span text:style-name="T2"> &amp;</text:span></text:span></text:p>
      <text:h text:style-name="P2" text:outline-level="3">How to Check Status</text:h>
      <text:p text:style-name="P23">bash</text:p>
      <text:p text:style-name="P25"><text:span text:style-name="Source_20_Text"><text:span text:style-name="T1">tail</text:span></text:span><text:span text:style-name="Source_20_Text"><text:span text:style-name="T2"> -10 ~/aimn-trade-final/engine.log | </text:span></text:span><text:span text:style-name="Source_20_Text"><text:span text:style-name="T1">grep</text:span></text:span><text:span text:style-name="Source_20_Text"><text:span text:style-name="T2"> </text:span></text:span><text:span text:style-name="Source_20_Text"><text:span text:style-name="T6">"👁\|SIGNAL\|EXIT"</text:span></text:span></text:p>
      <text:p text:style-name="P23">sql</text:p>
      <text:p text:style-name="P24"><text:span text:style-name="Source_20_Text"><text:span text:style-name="T7">SELECT</text:span></text:span><text:span text:style-name="Source_20_Text"><text:span text:style-name="T2"> symbol</text:span></text:span><text:span text:style-name="Source_20_Text"><text:span text:style-name="T8">,</text:span></text:span><text:span text:style-name="Source_20_Text"><text:span text:style-name="T2"> direction</text:span></text:span><text:span text:style-name="Source_20_Text"><text:span text:style-name="T8">,</text:span></text:span><text:span text:style-name="Source_20_Text"><text:span text:style-name="T2"> last_price</text:span></text:span><text:span text:style-name="Source_20_Text"><text:span text:style-name="T8">,</text:span></text:span><text:span text:style-name="Source_20_Text"><text:span text:style-name="T2"> peak_profit</text:span></text:span><text:span text:style-name="Source_20_Text"><text:span text:style-name="T8">,</text:span></text:span><text:span text:style-name="Source_20_Text"><text:span text:style-name="T2"> entry_time</text:span></text:span></text:p>
      <text:p text:style-name="P25"><text:span text:style-name="Source_20_Text"><text:span text:style-name="T7">FROM</text:span></text:span><text:span text:style-name="Source_20_Text"><text:span text:style-name="T2"> active_trades </text:span></text:span><text:span text:style-name="Source_20_Text"><text:span text:style-name="T7">WHERE</text:span></text:span><text:span text:style-name="Source_20_Text"><text:span text:style-name="T2"> </text:span></text:span><text:span text:style-name="Source_20_Text"><text:span text:style-name="T7">status</text:span></text:span><text:span text:style-name="Source_20_Text"><text:span text:style-name="T2"> = </text:span></text:span><text:span text:style-name="Source_20_Text"><text:span text:style-name="T6">'OPEN'</text:span></text:span><text:span text:style-name="Source_20_Text"><text:span text:style-name="T8">;</text:span></text:span></text:p>
      <text:p text:style-name="P23">sql</text:p>
      <text:p text:style-name="P24"><text:span text:style-name="Source_20_Text"><text:span text:style-name="T7">SELECT</text:span></text:span><text:span text:style-name="Source_20_Text"><text:span text:style-name="T2"> exit_reason</text:span></text:span><text:span text:style-name="Source_20_Text"><text:span text:style-name="T8">,</text:span></text:span><text:span text:style-name="Source_20_Text"><text:span text:style-name="T2"> </text:span></text:span><text:span text:style-name="Source_20_Text"><text:span text:style-name="T1">COUNT</text:span></text:span><text:span text:style-name="Source_20_Text"><text:span text:style-name="T8">(</text:span></text:span><text:span text:style-name="Source_20_Text"><text:span text:style-name="T2">*</text:span></text:span><text:span text:style-name="Source_20_Text"><text:span text:style-name="T8">)</text:span></text:span><text:span text:style-name="Source_20_Text"><text:span text:style-name="T2"> </text:span></text:span><text:span text:style-name="Source_20_Text"><text:span text:style-name="T7">as</text:span></text:span><text:span text:style-name="Source_20_Text"><text:span text:style-name="T2"> count</text:span></text:span><text:span text:style-name="Source_20_Text"><text:span text:style-name="T8">,</text:span></text:span></text:p>
      <text:p text:style-name="P24"><text:span text:style-name="Source_20_Text"><text:span text:style-name="T9"><text:s text:c="7"/></text:span></text:span><text:span text:style-name="Source_20_Text"><text:span text:style-name="T1">ROUND</text:span></text:span><text:span text:style-name="Source_20_Text"><text:span text:style-name="T8">(</text:span></text:span><text:span text:style-name="Source_20_Text"><text:span text:style-name="T1">SUM</text:span></text:span><text:span text:style-name="Source_20_Text"><text:span text:style-name="T8">(</text:span></text:span><text:span text:style-name="Source_20_Text"><text:span text:style-name="T2">pnl_percent</text:span></text:span><text:span text:style-name="Source_20_Text"><text:span text:style-name="T8">),</text:span></text:span><text:span text:style-name="Source_20_Text"><text:span text:style-name="T3">2</text:span></text:span><text:span text:style-name="Source_20_Text"><text:span text:style-name="T8">)</text:span></text:span><text:span text:style-name="Source_20_Text"><text:span text:style-name="T2"> </text:span></text:span><text:span text:style-name="Source_20_Text"><text:span text:style-name="T7">as</text:span></text:span><text:span text:style-name="Source_20_Text"><text:span text:style-name="T2"> total_pnl</text:span></text:span><text:span text:style-name="Source_20_Text"><text:span text:style-name="T8">,</text:span></text:span></text:p>
      <text:p text:style-name="P24"><text:span text:style-name="Source_20_Text"><text:span text:style-name="T9"><text:s text:c="7"/></text:span></text:span><text:span text:style-name="Source_20_Text"><text:span text:style-name="T1">ROUND</text:span></text:span><text:span text:style-name="Source_20_Text"><text:span text:style-name="T8">(</text:span></text:span><text:span text:style-name="Source_20_Text"><text:span text:style-name="T1">AVG</text:span></text:span><text:span text:style-name="Source_20_Text"><text:span text:style-name="T8">(</text:span></text:span><text:span text:style-name="Source_20_Text"><text:span text:style-name="T2">pnl_percent</text:span></text:span><text:span text:style-name="Source_20_Text"><text:span text:style-name="T8">),</text:span></text:span><text:span text:style-name="Source_20_Text"><text:span text:style-name="T3">2</text:span></text:span><text:span text:style-name="Source_20_Text"><text:span text:style-name="T8">)</text:span></text:span><text:span text:style-name="Source_20_Text"><text:span text:style-name="T2"> </text:span></text:span><text:span text:style-name="Source_20_Text"><text:span text:style-name="T7">as</text:span></text:span><text:span text:style-name="Source_20_Text"><text:span text:style-name="T2"> avg_pnl</text:span></text:span></text:p>
      <text:p text:style-name="P24"><text:span text:style-name="Source_20_Text"><text:span text:style-name="T7">FROM</text:span></text:span><text:span text:style-name="Source_20_Text"><text:span text:style-name="T2"> orders</text:span></text:span></text:p>
      <text:p text:style-name="P24"><text:span text:style-name="Source_20_Text"><text:span text:style-name="T7">WHERE</text:span></text:span><text:span text:style-name="Source_20_Text"><text:span text:style-name="T2"> created_at &gt; </text:span></text:span><text:span text:style-name="Source_20_Text"><text:span text:style-name="T1">NOW</text:span></text:span><text:span text:style-name="Source_20_Text"><text:span text:style-name="T8">()</text:span></text:span><text:span text:style-name="Source_20_Text"><text:span text:style-name="T2"> - </text:span></text:span><text:span text:style-name="Source_20_Text"><text:span text:style-name="T7">INTERVAL</text:span></text:span><text:span text:style-name="Source_20_Text"><text:span text:style-name="T2"> </text:span></text:span><text:span text:style-name="Source_20_Text"><text:span text:style-name="T3">24</text:span></text:span><text:span text:style-name="Source_20_Text"><text:span text:style-name="T2"> </text:span></text:span><text:span text:style-name="Source_20_Text"><text:span text:style-name="T7">HOUR</text:span></text:span></text:p>
      <text:p text:style-name="P25"><text:span text:style-name="Source_20_Text"><text:span text:style-name="T7">GROUP</text:span></text:span><text:span text:style-name="Source_20_Text"><text:span text:style-name="T2"> </text:span></text:span><text:span text:style-name="Source_20_Text"><text:span text:style-name="T7">BY</text:span></text:span><text:span text:style-name="Source_20_Text"><text:span text:style-name="T2"> exit_reason </text:span></text:span><text:span text:style-name="Source_20_Text"><text:span text:style-name="T7">ORDER</text:span></text:span><text:span text:style-name="Source_20_Text"><text:span text:style-name="T2"> </text:span></text:span><text:span text:style-name="Source_20_Text"><text:span text:style-name="T7">BY</text:span></text:span><text:span text:style-name="Source_20_Text"><text:span text:style-name="T2"> total_pnl </text:span></text:span><text:span text:style-name="Source_20_Text"><text:span text:style-name="T7">DESC</text:span></text:span><text:span text:style-name="Source_20_Text"><text:span text:style-name="T8">;</text:span>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6T10:20:19.368112600</meta:creation-date>
    <dc:date>2026-05-06T10:21:54.692635000</dc:date>
    <meta:editing-duration>PT1M36S</meta:editing-duration>
    <meta:editing-cycles>1</meta:editing-cycles>
    <meta:document-statistic meta:table-count="0" meta:image-count="0" meta:object-count="0" meta:page-count="2" meta:paragraph-count="81" meta:word-count="637" meta:character-count="4084" meta:non-whitespace-character-count="3491"/>
    <meta:generator>LibreOffice/25.8.5.2$Windows_X86_64 LibreOffice_project/9c8b85f387cc00a89945a79c9e6239f32e450ac2</meta:generator>
  </office:meta>
</office:document-meta>
</file>